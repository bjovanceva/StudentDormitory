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EF000004195E07370EE2C780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20pt" fo:language="mk" fo:country="MK" fo:font-weight="bold" officeooo:rsid="001bca6a" officeooo:paragraph-rsid="001bca6a"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Times New Roman" fo:font-size="12pt" fo:language="mk" fo:country="MK" fo:font-weight="normal" officeooo:rsid="001bca6a" officeooo:paragraph-rsid="001bca6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4pt" fo:language="mk" fo:country="MK" fo:font-weight="bold" officeooo:rsid="001bca6a" officeooo:paragraph-rsid="001bca6a"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language="en" fo:country="US" fo:font-weight="bold" officeooo:rsid="001bca6a" officeooo:paragraph-rsid="001bca6a"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language="en" fo:country="US" fo:font-weight="normal" officeooo:rsid="001bca6a" officeooo:paragraph-rsid="001bca6a" style:font-size-asian="12pt" style:font-weight-asian="normal" style:font-size-complex="12pt" style:font-weight-complex="normal"/>
    </style:style>
    <style:style style:name="P6" style:family="paragraph" style:parent-style-name="Standard" style:list-style-name="L3">
      <style:paragraph-properties fo:text-align="start" style:justify-single-word="false"/>
      <style:text-properties style:font-name="Times New Roman" fo:font-size="12pt" fo:language="mk" fo:country="MK" fo:font-weight="normal" officeooo:rsid="001bca6a" officeooo:paragraph-rsid="001d8c50"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mk" fo:country="MK" fo:font-weight="normal" officeooo:rsid="001bca6a" officeooo:paragraph-rsid="001bca6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language="mk" fo:country="MK" fo:font-weight="normal" officeooo:rsid="001bca6a" officeooo:paragraph-rsid="001d8c50"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style:font-name="Times New Roman" fo:font-size="12pt" fo:language="mk" fo:country="MK" fo:font-weight="normal" officeooo:rsid="001d8c50" officeooo:paragraph-rsid="001d8c50"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mk" fo:country="MK" fo:font-weight="normal" officeooo:rsid="001d8c50" officeooo:paragraph-rsid="001d8c5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4pt" fo:language="mk" fo:country="MK" fo:font-weight="bold" officeooo:rsid="001d8c50" officeooo:paragraph-rsid="001d8c50" style:font-size-asian="14pt" style:font-weight-asian="bold" style:font-size-complex="14pt" style:font-weight-complex="bold"/>
    </style:style>
    <style:style style:name="P12" style:family="paragraph" style:parent-style-name="Standard">
      <style:paragraph-properties fo:text-align="start" style:justify-single-word="false"/>
      <style:text-properties officeooo:paragraph-rsid="001d8c50"/>
    </style:style>
    <style:style style:name="P13" style:family="paragraph" style:parent-style-name="Standard" style:list-style-name="L3">
      <style:paragraph-properties fo:text-align="start" style:justify-single-word="false"/>
      <style:text-properties officeooo:paragraph-rsid="001d8c50"/>
    </style:style>
    <style:style style:name="T1" style:family="text">
      <style:text-properties fo:language="mk" fo:country="MK"/>
    </style:style>
    <style:style style:name="T2" style:family="text">
      <style:text-properties style:font-name="Times New Roman" fo:font-size="12pt" fo:language="mk" fo:country="MK" fo:font-weight="normal" officeooo:rsid="001bca6a" style:font-size-asian="12pt" style:font-weight-asian="normal" style:font-size-complex="12pt" style:font-weight-complex="normal"/>
    </style:style>
    <style:style style:name="T3" style:family="text">
      <style:text-properties fo:language="en" fo:country="US"/>
    </style:style>
    <style:style style:name="T4" style:family="text">
      <style:text-properties fo:language="en" fo:country="US" officeooo:rsid="001d8c50"/>
    </style:style>
    <style:style style:name="T5" style:family="text">
      <style:text-properties officeooo:rsid="001d8c50"/>
    </style:style>
    <style:style style:name="T6" style:family="text">
      <style:text-properties fo:color="#c9211e" loext:opacity="100%"/>
    </style:style>
    <style:style style:name="T7" style:family="text">
      <style:text-properties fo:color="#c9211e" loext:opacity="100%" style:font-name="Times New Roman" fo:font-size="12pt" fo:language="mk" fo:country="MK" fo:font-weight="normal" officeooo:rsid="001bca6a" style:font-size-asian="12pt" style:font-weight-asian="normal" style:font-size-complex="12pt" style:font-weight-complex="normal"/>
    </style:style>
    <style:style style:name="T8" style:family="text">
      <style:text-properties officeooo:rsid="001bca6a"/>
    </style:style>
    <style:style style:name="T9" style:family="text">
      <style:text-properties fo:font-weight="bold" style:font-weight-asian="bold" style:font-weight-complex="bold"/>
    </style:style>
    <style:style style:name="T10" style:family="text">
      <style:text-properties officeooo:rsid="001de6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65in" fo:text-indent="-0.25in" fo:margin-left="3.16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истем за вселување во студентски дом</text:p>
      <text:p text:style-name="P2"/>
      <text:p text:style-name="P4">Domain <text:span text:style-name="T1">слој:</text:span></text:p>
      <text:p text:style-name="P12"><text:span text:style-name="T2">Апликацијата се состои од следните модели:</text:span></text:p>
      <text:list xml:id="list322883724" text:style-name="L3">
        <text:list-item>
          <text:p text:style-name="P13"><text:span text:style-name="T7">студентски дом</text:span><text:span text:style-name="T2"> - уникатен идентификатор, назив, слика, локација, вкупен број на соби, вкупен број на легла, дали има читална, дали има менза, месечна станарина, цена за прв месец која се плаќа при аплицирање, листа од потребни документи, потребни документи со опција за симнување</text:span></text:p>
        </text:list-item>
        <text:list-item>
          <text:p text:style-name="P6"><text:span text:style-name="T6">соба</text:span> - уникатен идентификатор, слика, број/назив, дали е дел од дуплекс или не, дали има сопствен тоалет, број на легла, дали има кујна, дали е слободна или зафатена, број на веќе вселени студенти, ориентација(исток/запад/север/југ), во кој студентски дом е</text:p>
        </text:list-item>
        <text:list-item>
          <text:p text:style-name="P9"><text:span text:style-name="T6">документ</text:span> - <text:span text:style-name="T8">уникатен идентификатор, </text:span>име,<text:span text:style-name="T8"> </text:span>патека (локално) </text:p>
        </text:list-item>
        <text:list-item>
          <text:p text:style-name="P6"><text:span text:style-name="T6">апликација </text:span>- уникатен идентификатор, студент кој аплицира, студентски дом за кој аплицира, соба за која аплицира, датум на аплицирање, статус на апликација (<text:span text:style-name="T5">чекање</text:span><text:span text:style-name="T4">/</text:span><text:span text:style-name="T3">прифатено</text:span>/одбиено), коментар</text:p>
        </text:list-item>
        <text:list-item>
          <text:p text:style-name="P6"><text:span text:style-name="T6">корисник</text:span> - уникатен идентификатор, слика, име, презиме, адреса на живеење, email, улога: <text:s text:c="5"/></text:p>
          <text:list>
            <text:list-item>
              <text:list>
                <text:list-item>
                  <text:p text:style-name="P6"><text:span text:style-name="T9">студент</text:span> - факултет на кој студира, година на студирање, уникатен идентификатор од апликацијата за студентски дом на конкурсот од МОН <text:s text:c="2"/></text:p>
                </text:list-item>
                <text:list-item>
                  <text:p text:style-name="P6"><text:span text:style-name="T9">референт</text:span> - студентски дом во кој работи </text:p>
                </text:list-item>
                <text:list-item>
                  <text:p text:style-name="P6"><text:span text:style-name="T9">admin</text:span> - ги внесува референтите во системот <text:s text:c="6"/></text:p>
                </text:list-item>
              </text:list>
            </text:list-item>
          </text:list>
          <text:p text:style-name="P6"/>
        </text:list-item>
      </text:list>
      <text:p text:style-name="P2"><text:s text:c="2"/></text:p>
      <text:p text:style-name="P2"/>
      <text:p text:style-name="P3">Опис на системот:</text:p>
      <text:p text:style-name="P3"/>
      <text:p text:style-name="P7">Секој студент по најава на системот има опција да ги прегледува студентските домови, како и собите кои се наоѓаат во него. За секој студентски <text:span text:style-name="T5">дом</text:span>, како и за секоја соба може да прегледува детали. За полесен преглед, приказот на собите кои се слободни е различен од приказот на зафатените соби. При преглед на деталите за студентскиот дом има опција да ги симне потребните документи за аплицирање. За секоја слободна соба има опција за <text:span text:style-name="T5">резервација</text:span>. Во апликацијата треба да ги прикачи и потребните документи за соодветниот студентски дом за кој аплицира. Може да внесе и коментар <text:span text:style-name="T5">во вид на прашање или молба до референтките</text:span>. Секако, студентот што тековно аплицира има увид дали има или се’ уште нема вселено некој во собата. На крајот на самата апликација на корисникот му се прикажува екран за плаќање. По плаќањето, апликацијата се додава во делот 'Мои апликации' на соодветниот студент. </text:p>
      <text:p text:style-name="P7"/>
      <text:p text:style-name="P7">Секој рефенет по најава на системот има опција да ги прегледува студентските домови, како и собите кои се наоѓаат во него. Покрај нив, има опција да ги прегледува непрегледаните апликации и во посебен дел прегледаните апликации. Благодарение на уникатниот идентификатор од апликацијата за студентски дом на конкурсот од МОН референтите можат да прегледаат дали студентот има аплицирано за домот во кој е примен, а не поинаку. По прегледување на апликацијата, референтот има опција да ја прифати апликацијата, доколку потребните документи се уредно поднесени или да ја одбие доколку нешто не е во ред. <text:span text:style-name="T5">Доколку собата за која аплицирал е зафатена, а се’ останато е во ред, тогаш референтот го сместува во друга соба во која има место.</text:span></text:p>
      <text:p text:style-name="P8">Студентот во делот 'Мои апликации' може да провери дали е примен во домот или не. <text:s/><text:span text:style-name="T5">Апликацијата добива статус “прифатена“ доколку студентот добил соба. </text:span>Исто така, добива <text:soft-page-break/>известување и преку е-пошта <text:span text:style-name="T5">во која се наведени детали и број на соба доколку е примен и причина зошто не е примен доколу тоа е случај</text:span>.</text:p>
      <text:p text:style-name="P7"/>
      <text:p text:style-name="P7">Admin-от е единствениот кој додава студентски домови во системот. Соби може да додава и тој и секој референт. <text:span text:style-name="T5">Секој референт исто така може да додава и потребни документи. </text:span></text:p>
      <text:p text:style-name="P2"/>
      <text:p text:style-name="P5"/>
      <text:p text:style-name="P10">Идејата е референтките рачно да ги прегледуваат апликациите со цел да се <text:span text:style-name="T10">обезбеди</text:span> конзистентност на податоците на МОН.</text:p>
      <text:p text:style-name="P10"/>
      <text:p text:style-name="P11"/>
      <text:p text:style-name="P11">Ер-дијаграм</text:p>
      <text:p text:style-name="P11"/>
      <text:p text:style-name="P10">Дијаграмот е достапен преку линк на <text:span text:style-name="T3">Google Drive:</text:span></text:p>
      <text:p text:style-name="P11"><text:a xlink:type="simple" xlink:href="https://drive.google.com/file/d/1d7FWm5__ZH7Cs9N0vc9RZHpAdCwv4tXG/view?usp=sharing" text:style-name="Internet_20_link" text:visited-style-name="Visited_20_Internet_20_Link">https://drive.google.com/file/d/1d7FWm5__ZH7Cs9N0vc9RZHpAdCwv4tXG/view?usp=sharing</text:a></text:p>
      <text:p text:style-name="P10"/>
      <text:p text:style-name="P10"><draw:frame draw:style-name="fr1" draw:name="Image1" text:anchor-type="char" svg:x="0in" svg:y="0.4236in" svg:width="6.9252in" svg:height="3.5764in" draw:z-index="0"><draw:image xlink:href="Pictures/10000001000007EF000004195E07370EE2C7807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7T22:46:37.075000000</meta:creation-date>
    <dc:date>2026-02-19T21:59:58.807000000</dc:date>
    <meta:editing-duration>PT6H17M26S</meta:editing-duration>
    <meta:editing-cycles>4</meta:editing-cycles>
    <meta:generator>LibreOffice/7.4.2.3$Windows_X86_64 LibreOffice_project/382eef1f22670f7f4118c8c2dd222ec7ad009daf</meta:generator>
    <meta:document-statistic meta:table-count="0" meta:image-count="1" meta:object-count="0" meta:page-count="2" meta:paragraph-count="22" meta:word-count="555" meta:character-count="3581" meta:non-whitespace-character-count="3032"/>
  </office:meta>
</office:document-meta>
</file>